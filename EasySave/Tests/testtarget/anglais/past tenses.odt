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Policepardéfaut" style:family="text">
      <style:text-properties style:font-name-complex="Calibri" fo:language="en" fo:country="US"/>
    </style:style>
    <style:style style:name="T3" style:parent-style-name="Policepardéfaut" style:family="text">
      <style:text-properties style:font-name-complex="Calibri" fo:language="en" fo:country="US"/>
    </style:style>
    <style:style style:name="T4" style:parent-style-name="Policepardéfaut" style:family="text">
      <style:text-properties style:font-name-complex="Calibri" fo:language="en" fo:country="US"/>
    </style:style>
    <style:style style:name="T5" style:parent-style-name="Policepardéfaut" style:family="text">
      <style:text-properties style:font-name-complex="Calibri" fo:language="en" fo:country="US"/>
    </style:style>
    <style:style style:name="T6" style:parent-style-name="Policepardéfaut" style:family="text">
      <style:text-properties style:font-name-complex="Calibri" fo:language="en" fo:country="US"/>
    </style:style>
    <style:style style:name="T7" style:parent-style-name="Policepardéfaut" style:family="text">
      <style:text-properties style:font-name-complex="Calibri" fo:language="en" fo:country="US"/>
    </style:style>
    <style:style style:name="T8" style:parent-style-name="Policepardéfaut" style:family="text">
      <style:text-properties style:font-name-complex="Calibri" fo:language="en" fo:country="US"/>
    </style:style>
    <style:style style:name="T9" style:parent-style-name="Policepardéfaut" style:family="text">
      <style:text-properties style:font-name-complex="Calibri" fo:language="en" fo:country="US"/>
    </style:style>
    <style:style style:name="T10" style:parent-style-name="Policepardéfaut" style:family="text">
      <style:text-properties style:font-name-complex="Calibri" fo:language="en" fo:country="US"/>
    </style:style>
    <style:style style:name="T11" style:parent-style-name="Policepardéfaut" style:family="text">
      <style:text-properties style:font-name-complex="Calibri" fo:language="en" fo:country="US"/>
    </style:style>
    <style:style style:name="T12" style:parent-style-name="Policepardéfaut" style:family="text">
      <style:text-properties style:font-name-complex="Calibri" fo:language="en" fo:country="US"/>
    </style:style>
    <style:style style:name="T13" style:parent-style-name="Policepardéfaut" style:family="text">
      <style:text-properties style:font-name-complex="Calibri" fo:language="en" fo:country="US"/>
    </style:style>
    <style:style style:name="T14" style:parent-style-name="Policepardéfaut" style:family="text">
      <style:text-properties style:font-name-complex="Calibri" fo:language="en" fo:country="US"/>
    </style:style>
    <style:style style:name="T15" style:parent-style-name="Policepardéfaut" style:family="text">
      <style:text-properties style:font-name-complex="Calibri"/>
    </style:style>
    <style:style style:name="T16" style:parent-style-name="Policepardéfaut" style:family="text">
      <style:text-properties style:font-name-complex="Calibri"/>
    </style:style>
    <style:style style:name="T17" style:parent-style-name="Policepardéfaut" style:family="text">
      <style:text-properties style:font-name-complex="Calibri"/>
    </style:style>
    <style:style style:name="T18" style:parent-style-name="Policepardéfaut" style:family="text">
      <style:text-properties style:font-name-complex="Calibri" fo:language="en" fo:country="US"/>
    </style:style>
    <style:style style:name="P19" style:parent-style-name="Normal" style:family="paragraph">
      <style:text-properties style:font-name-complex="Calibri" fo:language="en" fo:country="US"/>
    </style:style>
    <style:style style:name="P20" style:parent-style-name="Normal" style:family="paragraph">
      <style:text-properties style:font-name-complex="Calibri" fo:language="en" fo:country="US"/>
    </style:style>
    <style:style style:name="P21" style:parent-style-name="Normal" style:family="paragraph">
      <style:text-properties style:font-name-complex="Calibri" fo:language="en" fo:country="US"/>
    </style:style>
    <style:style style:name="T22" style:parent-style-name="Policepardéfaut" style:family="text">
      <style:text-properties style:font-name-complex="Calibri" fo:language="en" fo:country="US"/>
    </style:style>
    <style:style style:name="T23" style:parent-style-name="Policepardéfaut" style:family="text">
      <style:text-properties style:font-name-complex="Calibri" fo:language="en" fo:country="US"/>
    </style:style>
    <style:style style:name="T24" style:parent-style-name="Policepardéfaut" style:family="text">
      <style:text-properties style:font-name-complex="Calibri" fo:language="en" fo:country="US"/>
    </style:style>
    <style:style style:name="P25" style:parent-style-name="Normal" style:family="paragraph">
      <style:text-properties style:font-name-complex="Calibri" fo:language="en" fo:country="US"/>
    </style:style>
    <style:style style:name="P26" style:parent-style-name="Normal" style:family="paragraph">
      <style:text-properties style:font-name-complex="Calibri" fo:language="en" fo:country="US"/>
    </style:style>
    <style:style style:name="P27" style:parent-style-name="Normal" style:family="paragraph">
      <style:text-properties style:font-name-complex="Calibri" fo:language="en" fo:country="US"/>
    </style:style>
    <style:style style:name="P28" style:parent-style-name="Normal" style:family="paragraph">
      <style:text-properties style:font-name-complex="Calibri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NGLISH CLASS:</text:p>
      <text:p text:style-name="Normal"><text:span text:style-name="T2">PAST TENSES<text:s/></text:span></text:p>
      <text:p text:style-name="Normal"><text:span text:style-name="T3"><text:s/></text:span></text:p>
      <text:p text:style-name="Normal"><text:span text:style-name="T4">It was raining and people were walking on the street.</text:span></text:p>
      <text:p text:style-name="Normal"><text:span text:style-name="T5">My mom was riding and i was singing</text:span></text:p>
      <text:p text:style-name="Normal"><text:span text:style-name="T6">I was walking when i heard a cat</text:span></text:p>
      <text:p text:style-name="Normal"><text:span text:style-name="T7">This morning i was wating for my train.</text:span></text:p>
      <text:p text:style-name="Normal"><text:span text:style-name="T8">Last time we were eating pizza.</text:span></text:p>
      <text:p text:style-name="Normal"><text:span text:style-name="T9"><text:s/></text:span></text:p>
      <text:p text:style-name="Normal"><text:span text:style-name="T10"><text:s/></text:span></text:p>
      <text:p text:style-name="Normal"><text:span text:style-name="T11">I was late this morning , because my train had been canceled.</text:span></text:p>
      <text:p text:style-name="Normal"><text:span text:style-name="T12">When i came back home, i saw that my cat had broken my TV<text:s/></text:span></text:p>
      <text:p text:style-name="Normal"><text:span text:style-name="T13">I was tired so i went to bed and i slept</text:span></text:p>
      <text:p text:style-name="Normal"><text:span text:style-name="T14"><text:s/></text:span></text:p>
      <text:p text:style-name="Normal"><text:span text:style-name="T15">GRAMMAR</text:span></text:p>
      <text:p text:style-name="Normal"><draw:frame draw:style-name="a0" draw:name="Image 149034243" text:anchor-type="as-char" svg:x="0in" svg:y="0in" svg:width="5in" svg:height="2.46875in" style:rel-width="scale" style:rel-height="scale"><draw:image xlink:href="media/image1.png" xlink:type="simple" xlink:show="embed" xlink:actuate="onLoad"/><svg:title/><svg:desc/></draw:frame></text:p>
      <text:p text:style-name="Normal"><text:span text:style-name="T16"><text:s/></text:span></text:p>
      <text:p text:style-name="Normal"><text:span text:style-name="T17"><text:s/></text:span></text:p>
      <text:p text:style-name="Normal"><text:span text:style-name="T18">My experience at cesi<text:s/></text:span></text:p>
      <text:p text:style-name="P19">I’ve always been good at sciences in school, and I liked mathematics. In primary school what i prefered was being better at solving problems than everyone else, especially the boys. They were so angry about it. It was like a game between us. <text:s/></text:p>
      <text:p text:style-name="P20">When I grew up/ it became/gota bit boring, but it was still my favorite class. So it was clear for me that i would be studying sciences later.</text:p>
      <text:soft-page-break/>
      <text:p text:style-name="P21">While I was in school learnig my lessons for my baccalaureat i was using apps to organise myself my homework, my free time , etc</text:p>
      <text:p text:style-name="Normal"><text:span text:style-name="T22">But none of<text:s/></text:span><text:span text:style-name="T23"><office:annotation office:name="0" xml:id="1184468868"><dc:creator>Utilisateur invité</dc:creator><dc:date>2023-10-17T11:10:00</dc:date><meta:creator-initials>Ui</meta:creator-initials><text:p text:style-name="Normal">this - these, that - those (singular and plural forms)</text:p></office:annotation>these<text:s/></text:span><office:annotation-end office:name="0"/><text:span text:style-name="T24">apps were exactly what I needed, so all of a sudden i got an idea! If i do it myself, it will meet all my expectations. Sadly I had not the skills to do it myself.</text:span></text:p>
      <text:p text:style-name="P25">That’s how I knew I had to learn about informatic technologie. Then every time i wished something on my phone was better, I thought that I will learn how to do it.<text:s/></text:p>
      <text:p text:style-name="P26">For example, I really wanted to be aware as soon as possible when my trains were late or canceled. But the SNCF app was not able to. So, I remember saying to my mom, “When I will be an informatician, I’ll made a greater app who’ll help everyone!”</text:p>
      <text:p text:style-name="P27">I was looking for an engineer school and I found CESI<text:s/></text:p>
      <text:p text:style-name="P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élie GAME</meta:initial-creator>
    <dc:creator>GAME AMÉLIE</dc:creator>
    <meta:creation-date>2023-10-17T09:59:00Z</meta:creation-date>
    <dc:date>2024-01-30T09:50:00Z</dc:date>
    <meta:template xlink:href="Normal" xlink:type="simple"/>
    <meta:editing-cycles>2</meta:editing-cycles>
    <meta:editing-duration>PT0S</meta:editing-duration>
    <meta:document-statistic meta:page-count="2" meta:paragraph-count="3" meta:word-count="245" meta:character-count="1595" meta:row-count="11" meta:non-whitespace-character-count="1353"/>
  </office:meta>
</office:document-meta>
</file>